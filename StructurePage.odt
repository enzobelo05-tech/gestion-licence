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B000001BCCA67A993.png" manifest:media-type="image/png"/>
  <manifest:file-entry manifest:full-path="Pictures/100000010000034C0000023E79B184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ab370" officeooo:paragraph-rsid="000ab370" style:font-size-asian="21pt" style:font-size-complex="24pt"/>
    </style:style>
    <style:style style:name="P2" style:family="paragraph" style:parent-style-name="Standard">
      <style:text-properties fo:font-size="18pt" officeooo:rsid="000c41cf" officeooo:paragraph-rsid="000c41cf" style:font-size-asian="15.75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pour les pages :</text:p>
      <text:p text:style-name="P1"><draw:frame draw:style-name="fr2" draw:name="Image1" text:anchor-type="char" svg:x="0cm" svg:y="0.226cm" svg:width="17cm" svg:height="7.407cm" draw:z-index="0"><draw:image xlink:href="Pictures/10000001000003FB000001BCCA67A993.png" xlink:type="simple" xlink:show="embed" xlink:actuate="onLoad" draw:mime-type="image/png"/></draw:frame></text:p>
      <text:p text:style-name="P2"><draw:frame draw:style-name="fr1" draw:name="Image2" text:anchor-type="char" svg:width="17cm" svg:height="11.561cm" draw:z-index="1"><draw:image xlink:href="Pictures/100000010000034C0000023E79B184BC.png" xlink:type="simple" xlink:show="embed" xlink:actuate="onLoad" draw:mime-type="image/png"/></draw:frame>Aside à reprendre complètement</text:p>
      <text:p text:style-name="P2">Header à reprendre et modifier</text:p>
      <text:p text:style-name="P2">Main à faire selon sa p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3:35:49.866000000</meta:creation-date>
    <dc:date>2026-03-12T13:45:35.623000000</dc:date>
    <meta:editing-duration>PT9M47S</meta:editing-duration>
    <meta:editing-cycles>2</meta:editing-cycles>
    <meta:generator>LibreOffice/24.2.1.2$Windows_X86_64 LibreOffice_project/db4def46b0453cc22e2d0305797cf981b68ef5ac</meta:generator>
    <meta:document-statistic meta:table-count="0" meta:image-count="2" meta:object-count="0" meta:page-count="1" meta:paragraph-count="4" meta:word-count="20" meta:character-count="112" meta:non-whitespace-character-count="96"/>
  </office:meta>
</office:document-meta>
</file>